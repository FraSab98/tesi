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font-style="italic" style:font-style-asian="italic" style:font-style-complex="italic"/>
    </style:style>
    <style:style style:name="T3" style:parent-style-name="Car.predefinitoparagrafo" style:family="text">
      <style:text-properties fo:font-weight="bold" style:font-weight-asian="bold" style:font-weight-complex="bold"/>
    </style:style>
    <style:style style:name="T4" style:parent-style-name="Car.predefinitoparagrafo" style:family="text">
      <style:text-properties fo:font-style="italic" style:font-style-asian="italic" style:font-style-complex="italic"/>
    </style:style>
    <style:style style:name="P5" style:parent-style-name="Normale" style:family="paragraph">
      <style:text-properties fo:font-weight="bold" style:font-weight-asian="bold" style:font-weight-complex="bold"/>
    </style:style>
    <style:style style:name="T6" style:parent-style-name="Car.predefinitoparagrafo" style:family="text">
      <style:text-properties fo:font-weight="bold" style:font-weight-asian="bold" style:font-weight-complex="bold"/>
    </style:style>
    <style:style style:name="T7" style:parent-style-name="Car.predefinitoparagrafo" style:family="text">
      <style:text-properties fo:font-weight="bold" style:font-weight-asian="bold" style:font-weight-complex="bold"/>
    </style:style>
    <style:style style:name="T8" style:parent-style-name="Car.predefinitoparagrafo" style:family="text">
      <style:text-properties fo:font-style="italic" style:font-style-asian="italic" style:font-style-complex="italic"/>
    </style:style>
    <style:style style:name="T9" style:parent-style-name="Car.predefinitoparagrafo" style:family="text">
      <style:text-properties fo:font-weight="bold" style:font-weight-asian="bold" style:font-weight-complex="bold"/>
    </style:style>
    <style:style style:name="P10" style:parent-style-name="Normale" style:family="paragraph">
      <style:text-properties fo:font-weight="bold" style:font-weight-asian="bold" style:font-weight-complex="bold"/>
    </style:style>
    <style:style style:name="T11" style:parent-style-name="Car.predefinitoparagrafo" style:family="text">
      <style:text-properties fo:font-weight="bold" style:font-weight-asian="bold" style:font-weight-complex="bold"/>
    </style:style>
    <style:style style:name="P12" style:parent-style-name="Normale" style:list-style-name="LFO1" style:family="paragraph"/>
    <style:style style:name="P13" style:parent-style-name="Normale" style:list-style-name="LFO1" style:family="paragraph"/>
    <style:style style:name="T14" style:parent-style-name="Car.predefinitoparagrafo" style:family="text">
      <style:text-properties fo:font-style="italic" style:font-style-asian="italic" style:font-style-complex="italic"/>
    </style:style>
    <style:style style:name="T15" style:parent-style-name="Car.predefinitoparagrafo" style:family="text">
      <style:text-properties fo:font-weight="bold" style:font-weight-asian="bold" style:font-weight-complex="bold"/>
    </style:style>
    <style:style style:name="T16" style:parent-style-name="Car.predefinitoparagrafo" style:family="text">
      <style:text-properties fo:font-weight="bold" style:font-weight-asian="bold" style:font-weight-complex="bold"/>
    </style:style>
    <style:style style:name="P17" style:parent-style-name="Normale" style:family="paragraph">
      <style:text-properties fo:font-weight="bold" style:font-weight-asian="bold" style:font-weight-complex="bold"/>
    </style:style>
    <style:style style:name="T18" style:parent-style-name="Car.predefinitoparagrafo" style:family="text">
      <style:text-properties fo:font-style="italic" style:font-style-asian="italic" style:font-style-complex="italic"/>
    </style:style>
    <style:style style:name="T19" style:parent-style-name="Car.predefinitoparagrafo" style:family="text">
      <style:text-properties fo:font-weight="bold" style:font-weight-asian="bold" style:font-weight-complex="bold"/>
    </style:style>
    <style:style style:name="P20" style:parent-style-name="Normale" style:list-style-name="LFO2" style:family="paragraph"/>
    <style:style style:name="T21" style:parent-style-name="Car.predefinitoparagrafo" style:family="text">
      <style:text-properties fo:font-style="italic" style:font-style-asian="italic" style:font-style-complex="italic"/>
    </style:style>
    <style:style style:name="P22" style:parent-style-name="Normale" style:list-style-name="LFO2" style:family="paragraph"/>
    <style:style style:name="T23" style:parent-style-name="Car.predefinitoparagrafo" style:family="text">
      <style:text-properties fo:font-style="italic" style:font-style-asian="italic" style:font-style-complex="italic"/>
    </style:style>
    <style:style style:name="T24" style:parent-style-name="Car.predefinitoparagrafo" style:family="text">
      <style:text-properties fo:font-weight="bold" style:font-weight-asian="bold" style:font-weight-complex="bold"/>
    </style:style>
    <style:style style:name="T25" style:parent-style-name="Car.predefinitoparagrafo" style:family="text">
      <style:text-properties fo:font-weight="bold" style:font-weight-asian="bold" style:font-weight-complex="bold"/>
    </style:style>
    <style:style style:name="T26" style:parent-style-name="Car.predefinitoparagrafo" style:family="text">
      <style:text-properties fo:font-weight="bold" style:font-weight-asian="bold" style:font-weight-complex="bold"/>
    </style:style>
    <style:style style:name="T27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28" style:parent-style-name="Car.predefinitoparagrafo" style:family="text">
      <style:text-properties fo:font-weight="bold" style:font-weight-asian="bold" style:font-weight-complex="bold"/>
    </style:style>
    <style:style style:name="T29" style:parent-style-name="Car.predefinitoparagrafo" style:family="text">
      <style:text-properties fo:font-weight="bold" style:font-weight-asian="bold" style:font-weight-complex="bold"/>
    </style:style>
    <style:style style:name="T30" style:parent-style-name="Car.predefinitoparagrafo" style:family="text">
      <style:text-properties fo:font-weight="bold" style:font-weight-asian="bold" style:font-weight-complex="bold"/>
    </style:style>
    <style:style style:name="P31" style:parent-style-name="Normale" style:list-style-name="LFO3" style:family="paragraph"/>
    <style:style style:name="T32" style:parent-style-name="Car.predefinitoparagrafo" style:family="text">
      <style:text-properties fo:font-weight="bold" style:font-weight-asian="bold" style:font-weight-complex="bold"/>
    </style:style>
    <style:style style:name="T33" style:parent-style-name="Car.predefinitoparagrafo" style:family="text">
      <style:text-properties fo:font-weight="bold" style:font-weight-asian="bold" style:font-weight-complex="bold"/>
    </style:style>
    <style:style style:name="T34" style:parent-style-name="Car.predefinitoparagrafo" style:family="text">
      <style:text-properties fo:font-weight="bold" style:font-weight-asian="bold" style:font-weight-complex="bold"/>
    </style:style>
    <style:style style:name="T35" style:parent-style-name="Car.predefinitoparagrafo" style:family="text">
      <style:text-properties fo:font-style="italic" style:font-style-asian="italic" style:font-style-complex="italic"/>
    </style:style>
    <style:style style:name="P36" style:parent-style-name="Normale" style:list-style-name="LFO3" style:family="paragraph"/>
    <style:style style:name="T37" style:parent-style-name="Car.predefinitoparagrafo" style:family="text">
      <style:text-properties fo:font-weight="bold" style:font-weight-asian="bold" style:font-weight-complex="bold"/>
    </style:style>
    <style:style style:name="T38" style:parent-style-name="Car.predefinitoparagrafo" style:family="text">
      <style:text-properties fo:font-style="italic" style:font-style-asian="italic" style:font-style-complex="italic"/>
    </style:style>
    <style:style style:name="T39" style:parent-style-name="Car.predefinitoparagrafo" style:family="text">
      <style:text-properties fo:font-weight="bold" style:font-weight-asian="bold" style:font-weight-complex="bold"/>
    </style:style>
    <style:style style:name="P40" style:parent-style-name="Normale" style:family="paragraph">
      <style:text-properties fo:font-weight="bold" style:font-weight-asian="bold" style:font-weight-complex="bold"/>
    </style:style>
    <style:style style:name="T41" style:parent-style-name="Car.predefinitoparagrafo" style:family="text">
      <style:text-properties fo:font-weight="bold" style:font-weight-asian="bold" style:font-weight-complex="bold"/>
    </style:style>
    <style:style style:name="P42" style:parent-style-name="Normale" style:list-style-name="LFO4" style:family="paragraph"/>
    <style:style style:name="T43" style:parent-style-name="Car.predefinitoparagrafo" style:family="text">
      <style:text-properties fo:font-weight="bold" style:font-weight-asian="bold" style:font-weight-complex="bold"/>
    </style:style>
    <style:style style:name="T44" style:parent-style-name="Car.predefinitoparagrafo" style:family="text">
      <style:text-properties fo:font-style="italic" style:font-style-asian="italic" style:font-style-complex="italic"/>
    </style:style>
    <style:style style:name="P45" style:parent-style-name="Normale" style:list-style-name="LFO4" style:family="paragraph"/>
    <style:style style:name="T46" style:parent-style-name="Car.predefinitoparagrafo" style:family="text">
      <style:text-properties fo:font-weight="bold" style:font-weight-asian="bold" style:font-weight-complex="bold"/>
    </style:style>
    <style:style style:name="T47" style:parent-style-name="Car.predefinitoparagrafo" style:family="text">
      <style:text-properties fo:font-weight="bold" style:font-weight-asian="bold" style:font-weight-complex="bold"/>
    </style:style>
    <style:style style:name="P48" style:parent-style-name="Normale" style:family="paragraph">
      <style:text-properties fo:font-weight="bold" style:font-weight-asian="bold" style:font-weight-complex="bold"/>
    </style:style>
    <style:style style:name="T49" style:parent-style-name="Car.predefinitoparagrafo" style:family="text">
      <style:text-properties fo:font-weight="bold" style:font-weight-asian="bold" style:font-weight-complex="bold"/>
    </style:style>
    <style:style style:name="T50" style:parent-style-name="Car.predefinitoparagrafo" style:family="text">
      <style:text-properties fo:font-weight="bold" style:font-weight-asian="bold" style:font-weight-complex="bold"/>
    </style:style>
    <style:style style:name="T51" style:parent-style-name="Car.predefinitoparagrafo" style:family="text">
      <style:text-properties fo:font-weight="bold" style:font-weight-asian="bold" style:font-weight-complex="bold"/>
    </style:style>
    <style:style style:name="T52" style:parent-style-name="Car.predefinitoparagrafo" style:family="text">
      <style:text-properties fo:font-weight="bold" style:font-weight-asian="bold" style:font-weight-complex="bold"/>
    </style:style>
    <style:style style:name="T53" style:parent-style-name="Car.predefinitoparagrafo" style:family="text">
      <style:text-properties fo:font-weight="bold" style:font-weight-asian="bold" style:font-weight-complex="bold"/>
    </style:style>
    <style:style style:name="T54" style:parent-style-name="Car.predefinitoparagrafo" style:family="text">
      <style:text-properties fo:font-weight="bold" style:font-weight-asian="bold" style:font-weight-complex="bold"/>
    </style:style>
    <style:style style:name="T55" style:parent-style-name="Car.predefinitoparagrafo" style:family="text">
      <style:text-properties fo:font-weight="bold" style:font-weight-asian="bold" style:font-weight-complex="bold"/>
    </style:style>
    <style:style style:name="P56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57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58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59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60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61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62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63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64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65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66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67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68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69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70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71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72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73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74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75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76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T77" style:parent-style-name="Car.predefinitoparagrafo" style:family="text">
      <style:text-properties fo:font-style="italic" style:font-style-asian="italic" style:font-style-complex="italic"/>
    </style:style>
    <style:style style:name="T78" style:parent-style-name="Car.predefinitoparagrafo" style:family="text">
      <style:text-properties fo:font-weight="bold" style:font-weight-asian="bold" style:font-weight-complex="bold"/>
    </style:style>
    <style:style style:name="T79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80" style:parent-style-name="Car.predefinitoparagrafo" style:family="text">
      <style:text-properties fo:font-weight="bold" style:font-weight-asian="bold" style:font-weight-complex="bold"/>
    </style:style>
    <style:style style:name="T81" style:parent-style-name="Car.predefinitoparagrafo" style:family="text">
      <style:text-properties fo:font-weight="bold" style:font-weight-asian="bold" style:font-weight-complex="bold"/>
    </style:style>
    <style:style style:name="T82" style:parent-style-name="Car.predefinitoparagrafo" style:family="text">
      <style:text-properties fo:font-style="italic" style:font-style-asian="italic" style:font-style-complex="italic"/>
    </style:style>
    <style:style style:name="T83" style:parent-style-name="Car.predefinitoparagrafo" style:family="text">
      <style:text-properties fo:font-weight="bold" style:font-weight-asian="bold" style:font-weight-complex="bold"/>
    </style:style>
    <style:style style:name="T84" style:parent-style-name="Car.predefinitoparagrafo" style:family="text">
      <style:text-properties fo:font-weight="bold" style:font-weight-asian="bold" style:font-weight-complex="bold"/>
    </style:style>
    <style:style style:name="T85" style:parent-style-name="Car.predefinitoparagrafo" style:family="text">
      <style:text-properties fo:font-weight="bold" style:font-weight-asian="bold" style:font-weight-complex="bold"/>
    </style:style>
    <style:style style:name="T86" style:parent-style-name="Car.predefinitoparagrafo" style:family="text">
      <style:text-properties fo:font-style="italic" style:font-style-asian="italic" style:font-style-complex="italic"/>
    </style:style>
    <style:style style:name="T87" style:parent-style-name="Car.predefinitoparagrafo" style:family="text">
      <style:text-properties fo:font-style="italic" style:font-style-asian="italic" style:font-style-complex="italic"/>
    </style:style>
    <style:style style:name="P88" style:parent-style-name="Normale" style:family="paragraph">
      <style:text-properties fo:font-weight="bold" style:font-weight-asian="bold" style:font-weight-complex="bold"/>
    </style:style>
    <style:style style:name="P89" style:parent-style-name="Normale" style:list-style-name="LFO5" style:family="paragraph"/>
    <style:style style:name="T90" style:parent-style-name="Car.predefinitoparagrafo" style:family="text">
      <style:text-properties fo:font-weight="bold" style:font-weight-asian="bold" style:font-weight-complex="bold"/>
    </style:style>
    <style:style style:name="T91" style:parent-style-name="Car.predefinitoparagrafo" style:family="text">
      <style:text-properties fo:font-weight="bold" style:font-weight-asian="bold" style:font-weight-complex="bold"/>
    </style:style>
    <style:style style:name="T92" style:parent-style-name="Car.predefinitoparagrafo" style:family="text">
      <style:text-properties fo:font-weight="bold" style:font-weight-asian="bold" style:font-weight-complex="bold"/>
    </style:style>
    <style:style style:name="P93" style:parent-style-name="Normale" style:list-style-name="LFO5" style:family="paragraph"/>
    <style:style style:name="T94" style:parent-style-name="Car.predefinitoparagrafo" style:family="text">
      <style:text-properties fo:font-weight="bold" style:font-weight-asian="bold" style:font-weight-complex="bold"/>
    </style:style>
    <style:style style:name="T95" style:parent-style-name="Car.predefinitoparagrafo" style:family="text">
      <style:text-properties fo:font-weight="bold" style:font-weight-asian="bold" style:font-weight-complex="bold"/>
    </style:style>
    <style:style style:name="T96" style:parent-style-name="Car.predefinitoparagrafo" style:family="text">
      <style:text-properties fo:font-weight="bold" style:font-weight-asian="bold" style:font-weight-complex="bold"/>
    </style:style>
    <style:style style:name="T97" style:parent-style-name="Car.predefinitoparagrafo" style:family="text">
      <style:text-properties fo:font-weight="bold" style:font-weight-asian="bold" style:font-weight-complex="bold"/>
    </style:style>
    <style:style style:name="T98" style:parent-style-name="Car.predefinitoparagrafo" style:family="text">
      <style:text-properties fo:font-weight="bold" style:font-weight-asian="bold" style:font-weight-complex="bold"/>
    </style:style>
    <style:style style:name="P99" style:parent-style-name="Normale" style:family="paragraph">
      <style:text-properties fo:font-weight="bold" style:font-weight-asian="bold" style:font-weight-complex="bold"/>
    </style:style>
    <style:style style:name="T100" style:parent-style-name="Car.predefinitoparagrafo" style:family="text">
      <style:text-properties fo:font-style="italic" style:font-style-asian="italic" style:font-style-complex="italic"/>
    </style:style>
    <style:style style:name="T101" style:parent-style-name="Car.predefinitoparagrafo" style:family="text">
      <style:text-properties fo:font-weight="bold" style:font-weight-asian="bold" style:font-weight-complex="bold"/>
    </style:style>
    <style:style style:name="T102" style:parent-style-name="Car.predefinitoparagrafo" style:family="text">
      <style:text-properties fo:font-weight="bold" style:font-weight-asian="bold" style:font-weight-complex="bold"/>
    </style:style>
    <style:style style:name="P103" style:parent-style-name="Normale" style:family="paragraph">
      <style:text-properties fo:font-weight="bold" style:font-weight-asian="bold" style:font-weight-complex="bold"/>
    </style:style>
    <style:style style:name="P104" style:parent-style-name="Normale" style:list-style-name="LFO6" style:family="paragraph"/>
    <style:style style:name="T105" style:parent-style-name="Car.predefinitoparagrafo" style:family="text">
      <style:text-properties fo:font-weight="bold" style:font-weight-asian="bold" style:font-weight-complex="bold"/>
    </style:style>
    <style:style style:name="T106" style:parent-style-name="Car.predefinitoparagrafo" style:family="text">
      <style:text-properties fo:font-style="italic" style:font-style-asian="italic" style:font-style-complex="italic"/>
    </style:style>
    <style:style style:name="T107" style:parent-style-name="Car.predefinitoparagrafo" style:family="text">
      <style:text-properties fo:font-style="italic" style:font-style-asian="italic" style:font-style-complex="italic"/>
    </style:style>
    <style:style style:name="P108" style:parent-style-name="Normale" style:list-style-name="LFO6" style:family="paragraph"/>
    <style:style style:name="T109" style:parent-style-name="Car.predefinitoparagrafo" style:family="text">
      <style:text-properties fo:font-weight="bold" style:font-weight-asian="bold" style:font-weight-complex="bold"/>
    </style:style>
    <style:style style:name="T110" style:parent-style-name="Car.predefinitoparagrafo" style:family="text">
      <style:text-properties fo:font-weight="bold" style:font-weight-asian="bold" style:font-weight-complex="bold"/>
    </style:style>
    <style:style style:name="P111" style:parent-style-name="Normale" style:list-style-name="LFO6" style:family="paragraph"/>
    <style:style style:name="T112" style:parent-style-name="Car.predefinitoparagrafo" style:family="text">
      <style:text-properties fo:font-weight="bold" style:font-weight-asian="bold" style:font-weight-complex="bold"/>
    </style:style>
    <style:style style:name="T113" style:parent-style-name="Car.predefinitoparagrafo" style:family="text">
      <style:text-properties fo:font-weight="bold" style:font-weight-asian="bold" style:font-weight-complex="bold"/>
    </style:style>
    <style:style style:name="T114" style:parent-style-name="Car.predefinitoparagrafo" style:family="text">
      <style:text-properties fo:font-weight="bold" style:font-weight-asian="bold" style:font-weight-complex="bold"/>
    </style:style>
    <style:style style:name="P115" style:parent-style-name="Normale" style:list-style-name="LFO6" style:family="paragraph"/>
    <style:style style:name="T116" style:parent-style-name="Car.predefinitoparagrafo" style:family="text">
      <style:text-properties fo:font-weight="bold" style:font-weight-asian="bold" style:font-weight-complex="bold"/>
    </style:style>
    <style:style style:name="T117" style:parent-style-name="Car.predefinitoparagrafo" style:family="text">
      <style:text-properties fo:font-weight="bold" style:font-weight-asian="bold" style:font-weight-complex="bold"/>
    </style:style>
    <style:style style:name="T118" style:parent-style-name="Car.predefinitoparagrafo" style:family="text">
      <style:text-properties fo:font-style="italic" style:font-style-asian="italic" style:font-style-complex="italic"/>
    </style:style>
    <style:style style:name="P119" style:parent-style-name="Normale" style:list-style-name="LFO6" style:family="paragraph"/>
    <style:style style:name="T120" style:parent-style-name="Car.predefinitoparagrafo" style:family="text">
      <style:text-properties fo:font-weight="bold" style:font-weight-asian="bold" style:font-weight-complex="bold"/>
    </style:style>
    <style:style style:name="T121" style:parent-style-name="Car.predefinitoparagrafo" style:family="text">
      <style:text-properties fo:font-style="italic" style:font-style-asian="italic" style:font-style-complex="italic"/>
    </style:style>
    <style:style style:name="P122" style:parent-style-name="Normale" style:family="paragraph">
      <style:text-properties fo:font-weight="bold" style:font-weight-asian="bold" style:font-weight-complex="bold"/>
    </style:style>
    <style:style style:name="T123" style:parent-style-name="Car.predefinitoparagrafo" style:family="text">
      <style:text-properties fo:font-weight="bold" style:font-weight-asian="bold" style:font-weight-complex="bold"/>
    </style:style>
    <style:style style:name="T124" style:parent-style-name="Car.predefinitoparagrafo" style:family="text">
      <style:text-properties fo:font-weight="bold" style:font-weight-asian="bold" style:font-weight-complex="bold"/>
    </style:style>
    <style:style style:name="T125" style:parent-style-name="Car.predefinitoparagrafo" style:family="text">
      <style:text-properties fo:font-weight="bold" style:font-weight-asian="bold" style:font-weight-complex="bold"/>
    </style:style>
    <style:style style:name="T126" style:parent-style-name="Car.predefinitoparagrafo" style:family="text">
      <style:text-properties fo:font-style="italic" style:font-style-asian="italic" style:font-style-complex="italic"/>
    </style:style>
    <style:style style:name="T127" style:parent-style-name="Car.predefinitoparagrafo" style:family="text">
      <style:text-properties fo:font-style="italic" style:font-style-asian="italic" style:font-style-complex="italic"/>
    </style:style>
    <style:style style:name="P128" style:parent-style-name="Normale" style:family="paragraph">
      <style:text-properties fo:font-weight="bold" style:font-weight-asian="bold" style:font-weight-complex="bold"/>
    </style:style>
    <style:style style:name="T129" style:parent-style-name="Car.predefinitoparagrafo" style:family="text">
      <style:text-properties fo:font-style="italic" style:font-style-asian="italic" style:font-style-complex="italic"/>
    </style:style>
    <style:style style:name="T130" style:parent-style-name="Car.predefinitoparagrafo" style:family="text">
      <style:text-properties fo:font-weight="bold" style:font-weight-asian="bold" style:font-weight-complex="bold"/>
    </style:style>
    <style:style style:name="T131" style:parent-style-name="Car.predefinitoparagrafo" style:family="text">
      <style:text-properties fo:font-weight="bold" style:font-weight-asian="bold" style:font-weight-complex="bold"/>
    </style:style>
    <style:style style:name="T132" style:parent-style-name="Car.predefinitoparagrafo" style:family="text">
      <style:text-properties fo:font-weight="bold" style:font-weight-asian="bold" style:font-weight-complex="bold"/>
    </style:style>
    <style:style style:name="T133" style:parent-style-name="Car.predefinitoparagrafo" style:family="text">
      <style:text-properties fo:font-style="italic" style:font-style-asian="italic" style:font-style-complex="italic"/>
    </style:style>
    <style:style style:name="T134" style:parent-style-name="Car.predefinitoparagrafo" style:family="text">
      <style:text-properties fo:font-style="italic" style:font-style-asian="italic" style:font-style-complex="italic"/>
    </style:style>
    <style:style style:name="T135" style:parent-style-name="Car.predefinitoparagrafo" style:family="text">
      <style:text-properties fo:font-style="italic" style:font-style-asian="italic" style:font-style-complex="italic"/>
    </style:style>
    <style:style style:name="T136" style:parent-style-name="Car.predefinitoparagrafo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Ottima domanda, ed è esattamente il punto in cui il tuo progetto può diventare<text:s/><text:span text:style-name="T2">predittivo</text:span><text:s/>e non solo descrittivo. La cosa importante è che<text:s/><text:span text:style-name="T3">gran parte del lavoro lo hai già fatto</text:span>: il sistema produce già, per ogni sessione, un<text:s/>insieme ricco di numeri (i punteggi dei test e gli indici multicanale). Quei numeri sono proprio le<text:s/><text:span text:style-name="T4">feature</text:span><text:s/>(le variabili in ingresso) che un modello di machine learning userebbe. Ti manca solo lo strato che le prende e produce una probabilità.</text:p>
      <text:p text:style-name="P5">Dove si inserisce: un nuovo "strato predittivo" a valle</text:p>
      <text:p text:style-name="Normale">Pensa al flusso attuale: i test producono punteggi, la pipeline produce indici, e l'<text:span text:style-name="T6">aggregatore</text:span><text:s/>(reporting/aggregator.py) li raccoglie tutti per costruire il report. Il modello predittivo si inserisce<text:s/><text:span text:style-name="T7">subito dopo l'aggregatore</text:span>: prende i dati già raccolti e aggiunge una nuova informazione — la stima della condizione.</text:p>
      <text:p text:style-name="Normale">In termini di analogia col ristorante: oggi la cucina prepara il piatto e descrive cosa contiene; lo strato ML è un<text:s/><text:span text:style-name="T8">consulente</text:span><text:s/>che, guardando la scheda completa del piatto, dice "secondo me questo profilo assomiglia all'80% a X, al 15% a Y, al 5% a sano".</text:p>
      <text:p text:style-name="Normale">Architettonicamente NON va dentro i singoli test né dentro la pipeline: va in un<text:s/><text:span text:style-name="T9">modulo nuovo e separato</text:span>, perché ha un ciclo di vita diverso (si addestra a parte, si carica all'avvio, si aggiorna nel tempo). Questo rispetta la modularità che hai già.</text:p>
      <text:p text:style-name="P10">Cosa entra e cosa esce</text:p>
      <text:p text:style-name="Normale"><text:span text:style-name="T11">Input (il "vettore di feature").</text:span><text:s/>Tutto ciò che il sistema già calcola per una sessione, appiattito in una lista di numeri:</text:p>
      <text:list text:style-name="LFO1" text:continue-numbering="true">
        <text:list-item>
          <text:p text:style-name="P12">dai test cognitivi: tempi di reazione medi e variabilità, tassi di omissione/commissione, span di memoria, effetto Stroop, indici di rischio del Go/No-Go;</text:p>
        </text:list-item>
        <text:list-item>
          <text:p text:style-name="P13">dalla pipeline multicanale: i tre indici compositi (strain, distress, quality) e le metriche linguistiche grezze (densità lessicale, MATTR, coesione, profondità sintattica), sentiment ed emozioni.</text:p>
        </text:list-item>
      </text:list>
      <text:p text:style-name="Normale">In pratica una ventina-trentina di numeri che riassumono la prestazione cognitiva<text:s/><text:span text:style-name="T14">e</text:span><text:s/>il profilo linguistico-emotivo del soggetto.</text:p>
      <text:p text:style-name="Normale"><text:span text:style-name="T15">Output.</text:span><text:s/>Una distribuzione di probabilità sulle classi, es. { "sano": 0.05, "MCI": 0.15, "Alzheimer": 0.80 }. È esattamente la "percentuale di quale malattia" che cerchi. Tecnicamente è un<text:s/><text:span text:style-name="T16">classificatore multi-classe</text:span><text:s/>con uscita probabilistica.</text:p>
      <text:p text:style-name="P17">I file da aggiungere (concreti, nel tuo stile)</text:p>
      <text:p text:style-name="Normale">Un nuovo package backend/app/ml/ con due file:</text:p>
      <text:p text:style-name="Normale">feature_builder.py — una funzione build_feature_vector(scores, analyses) -&gt; dict che trasforma i punteggi e le analisi della sessione in un dizionario ordinato di feature numeriche. Riusa<text:s/><text:span text:style-name="T18">gli stessi dati</text:span><text:s/>che l'aggregatore già legge dal database, quindi non duplichi nulla.</text:p>
      <text:p text:style-name="Normale">predictor.py — una classe CognitivePredictor che all'avvio carica il modello addestrato (un file salvato, es. model.joblib) ed espone predict_proba(features) -&gt; dict che restituisce le probabilità per condizione.</text:p>
      <text:p text:style-name="Normale"><text:span text:style-name="T19">Il punto di aggancio nel codice esistente.</text:span><text:s/>Due opzioni, scegline una:</text:p>
      <text:list text:style-name="LFO2" text:continue-numbering="true">
        <text:list-item>
          <text:p text:style-name="P20"><text:span text:style-name="T21">Integrato nel report:</text:span><text:s/>dentro aggregator.build_report (o nell'endpoint get_session_report di sessions.py), dopo aver costruito il report, chiami il predittore e<text:s/>aggiungi report["prediction"] = predictor.predict_proba(features). Così la stima compare automaticamente nel report e nel PDF.</text:p>
        </text:list-item>
        <text:list-item>
          <text:p text:style-name="P22"><text:span text:style-name="T23">Endpoint dedicato:</text:span><text:s/>POST /api/v1/predict/session/{id} che carica i dati della sessione, costruisce le feature, predice e restituisce le probabilità. Più pulito se vuoi tenere la predizione separata dal report.</text:p>
        </text:list-item>
      </text:list>
      <text:p text:style-name="Normale"><text:span text:style-name="T24">Persistenza.</text:span><text:s/>Salvi l'esito come per le analisi: o una nuova tabella predictions, o riusando analysis_results con analysis_type="prediction" e le probabilità dentro features. La seconda è la via più rapida e coerente con quello che hai già.</text:p>
      <text:p text:style-name="Normale"><text:span text:style-name="T25">Frontend.</text:span><text:s/>In ReportDashboard aggiungi una piccola sezione con un grafico a barre delle probabilità per condizione — riusi la stessa logica dei grafici che hai già.</text:p>
      <text:p text:style-name="Normale"><text:span text:style-name="T26">Quale modello scegliere (e perché<text:s/></text:span><text:span text:style-name="T27">non</text:span><text:span text:style-name="T28"><text:s/>subito una rete neurale)</text:span></text:p>
      <text:p text:style-name="Normale">Qui c'è una scelta tecnica che il relatore apprezzerà se la motivi bene. I tuoi dati sono<text:s/><text:span text:style-name="T29">tabellari</text:span><text:s/>(poche decine di feature numeriche) e, realisticamente,<text:s/><text:span text:style-name="T30">pochi</text:span><text:s/>(poche centinaia di sessioni, non milioni). In questo<text:s/>regime:</text:p>
      <text:list text:style-name="LFO3" text:continue-numbering="true">
        <text:list-item>
          <text:p text:style-name="P31">I modelli<text:s/><text:span text:style-name="T32">classici</text:span><text:s/>— regressione logistica, Random Forest, Gradient Boosting (XGBoost/LightGBM) — di solito<text:s/><text:span text:style-name="T33">battono le reti neurali</text:span><text:s/>su dati tabellari piccoli, si addestrano in secondi e, soprattutto, sono<text:s/><text:span text:style-name="T34">interpretabili</text:span>: puoi mostrare<text:s/><text:span text:style-name="T35">quali feature</text:span><text:s/>hanno pesato (importanza delle variabili, SHAP). In ambito clinico l'interpretabilità è quasi più importante dell'accuratezza.</text:p>
        </text:list-item>
        <text:list-item>
          <text:p text:style-name="P36">Una<text:s/><text:span text:style-name="T37">rete neurale</text:span><text:s/>(un semplice MLP, percettrone multistrato) ha senso solo se hai molti dati, oppure se vuoi lavorare<text:s/><text:span text:style-name="T38">direttamente sul linguaggio</text:span><text:s/>— per esempio fine-tuning di un transformer sulle trascrizioni per la rilevazione di Alzheimer dal parlato. È più potente ma più affamato di dati e più difficile da spiegare.</text:p>
        </text:list-item>
      </text:list>
      <text:p text:style-name="Normale">Consiglio per la tesi: parti da un<text:s/><text:span text:style-name="T39">Gradient Boosting</text:span><text:s/>come baseline forte e interpretabile, e presenta la rete neurale come estensione/confronto. Usa scikit-learn con una pipeline StandardScaler + classificatore, salvata con joblib, addestrata offline in un notebook e caricata dal backend.</text:p>
      <text:p text:style-name="P40">Il vero nodo: i dati etichettati</text:p>
      <text:p text:style-name="Normale">Sii consapevole di una cosa, perché è la prima domanda che ti farà il relatore:<text:s/><text:span text:style-name="T41">un modello supervisionato ha bisogno di esempi etichettati</text:span>, cioè sessioni di cui si conosce già la diagnosi. Senza, non si può addestrare. Hai due strade:</text:p>
      <text:list text:style-name="LFO4" text:continue-numbering="true">
        <text:list-item>
          <text:p text:style-name="P42"><text:span text:style-name="T43">Dataset pubblici per la parte linguistica:</text:span><text:s/>quelli che avevamo già individuato (tipo DementiaBank / ADReSS) contengono trascrizioni di parlato di pazienti con e senza Alzheimer, già etichettate. Sono perfetti per addestrare il modello<text:s/><text:span text:style-name="T44">sul canale linguistico</text:span>.</text:p>
        </text:list-item>
        <text:list-item>
          <text:p text:style-name="P45"><text:span text:style-name="T46">Coorte raccolta sul campo</text:span><text:s/>per la parte dei test cognitivi: qui servirebbero dati con diagnosi, raccolti con la collaborazione clinica (dott. Stanzione). In assenza, questa parte resta un'estensione futura.</text:p>
        </text:list-item>
      </text:list>
      <text:p text:style-name="Normale">Una via pragmatica per la tesi: addestri e validi il modello sulle feature<text:s/><text:span text:style-name="T47">linguistiche/multicanale</text:span><text:s/>usando un dataset pubblico etichettato, dimostrando che il tuo strato predittivo funziona, e presenti l'integrazione con i test cognitivi come naturale prosecuzione quando i dati clinici saranno disponibili.</text:p>
      <text:p text:style-name="P48">Cautele da dichiarare esplicitamente (importanti in tesi)</text:p>
      <text:p text:style-name="Normale">Tre cose da scrivere nero su bianco, perché ti proteggono e sono corrette metodologicamente:</text:p>
      <text:p text:style-name="Normale">Primo, l'output è uno<text:s/><text:span text:style-name="T49">strumento di supporto e screening orientativo, non una diagnosi</text:span>: la decisione resta al clinico. Questo va detto chiaramente, anche nell'interfaccia.</text:p>
      <text:p text:style-name="Normale">Secondo, con pochi dati servono<text:s/><text:span text:style-name="T50">validazione seria</text:span><text:s/>(cross-validation, metriche oneste come sensibilità/specificità e AUC, non solo accuratezza) e<text:s/><text:span text:style-name="T51">calibrazione delle probabilità</text:span><text:s/>(es. Platt scaling), altrimenti quel "80%" non è un numero affidabile.</text:p>
      <text:p text:style-name="Normale">Terzo, punta sull'<text:span text:style-name="T52">interpretabilità</text:span>: mostrare quali feature hanno determinato la stima rende il modello credibile e clinicamente utile, ed è un ottimo argomento di tesi.</text:p>
      <text:p text:style-name="Normale">In sintesi: lo inserisci come<text:s/><text:span text:style-name="T53">nuovo modulo ml/ agganciato dopo l'aggregatore</text:span>, alimentato dalle feature che già produci, con un classificatore tabellare interpretabile come punto di partenza; il collo di bottiglia non è il codice — quello è semplice — ma i<text:s/><text:span text:style-name="T54">dati etichettati</text:span><text:s/>per addestrarlo.</text:p>
      <text:p text:style-name="Normale">Se vuoi, posso prepararti lo<text:s/><text:span text:style-name="T55">scheletro concreto</text:span><text:s/>dei due file (feature_builder.py e predictor.py) con una funzione di estrazione feature che legge davvero i tuoi cognitive_scores e analysis_results, più un notebook di esempio per addestrare un Gradient Boosting su un dataset etichettato. Così avresti già la struttura pronta da riempire quando hai i dati. Vuoi che proceda?</text:p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Normale">Buona domanda, perché c'è una distinzione precisa che è importante che tu sappia spiegare. Verifico nel codice reale<text:s/><text:span text:style-name="T77">dove</text:span><text:s/>il<text:s/>provider LLM viene effettivamente invocato:Confermo quali generatori usano l'LLM e quali sono procedurali (chi sovrascrive generate lavora senza LLM):Ottimo, perché qui c'è una distinzione che il relatore potrebbe metterti alla prova e che molti confondono. Te la spiego nel dettaglio, sul codice reale.</text:p>
      <text:p text:style-name="Normale"><text:span text:style-name="T78">La distinzione fondamentale: l'LLM<text:s/></text:span><text:span text:style-name="T79">generativo</text:span><text:span text:style-name="T80"><text:s/>non è la pipeline di analisi</text:span></text:p>
      <text:p text:style-name="Normale">Nel tuo progetto ci sono due famiglie di "intelligenza artificiale" che è importante non confondere:</text:p>
      <text:p text:style-name="Normale">L'<text:span text:style-name="T81">LLM generativo</text:span><text:s/>(Claude via<text:s/>API, oppure Llama tramite Ollama) è un modello che<text:s/><text:span text:style-name="T82">produce testo nuovo</text:span>. Nel tuo sistema serve<text:s/><text:span text:style-name="T83">solo a generare gli stimoli di alcuni test</text:span>.</text:p>
      <text:p text:style-name="Normale">I<text:s/><text:span text:style-name="T84">modelli di analisi</text:span><text:s/>della pipeline multicanale (spaCy per la linguistica, BERT italiano per il sentiment, FEEL-IT per le emozioni, Whisper per la trascrizione)<text:s/><text:span text:style-name="T85">non sono LLM generativi</text:span>: sono modelli specializzati che<text:s/><text:span text:style-name="T86">classificano o estraggono</text:span><text:s/>informazioni da un testo o da un audio, non lo generano. Se il relatore ti chiede "dove usi l'LLM?", la risposta corretta è:<text:s/><text:span text:style-name="T87">nella generazione degli stimoli</text:span>, non nell'analisi. Confondere le due cose è l'errore classico.</text:p>
      <text:p text:style-name="P88">Dove viene usato esattamente: generazione stimoli di Digit Span e Stroop</text:p>
      <text:p text:style-name="Normale">Ho verificato nel codice quali generatori usano davvero l'LLM. Il risultato è netto:</text:p>
      <text:list text:style-name="LFO5" text:continue-numbering="true">
        <text:list-item>
          <text:p text:style-name="P89"><text:span text:style-name="T90">Digit Span</text:span><text:s/>e<text:s/><text:span text:style-name="T91">Stroop</text:span><text:s/>→<text:s/><text:span text:style-name="T92">usano l'LLM</text:span>: ereditano il metodo generate() della classe base, che invoca il provider.</text:p>
        </text:list-item>
        <text:list-item>
          <text:p text:style-name="P93"><text:span text:style-name="T94">CPT</text:span>,<text:s/><text:span text:style-name="T95">Go/No-Go</text:span><text:s/>e<text:s/><text:span text:style-name="T96">Narrativa</text:span><text:s/>→<text:s/><text:span text:style-name="T97">procedurali</text:span>: sovrascrivono generate() e costruiscono gli stimoli con semplice logica/casualità, senza LLM.</text:p>
        </text:list-item>
      </text:list>
      <text:p text:style-name="Normale">Il motivo di questa divisione è una scelta progettuale sensata: CPT e Go/No-Go hanno stimoli combinatori elementari (sequenze di lettere o segnali colorati) che non richiedono "creatività"; la Narrativa pesca uno spunto da un repertorio curato a mano. Digit Span e Stroop, invece, passano per l'LLM perché il framework consente di generare stimoli<text:s/><text:span text:style-name="T98">vari, bilanciati e non ripetitivi</text:span><text:s/>rispettando vincoli linguistici, ed è estendibile a stimoli più ricchi in futuro. In sintesi: l'LLM è usato dove la generazione beneficia di varietà controllata, non dove basta il codice.</text:p>
      <text:p text:style-name="P99">Come è strutturato: un provider intercambiabile</text:p>
      <text:p text:style-name="Normale">L'LLM non è "cablato" nel codice: c'è un'astrazione. In llm/provider.py la classe LLMProvider definisce un<text:s/><text:span text:style-name="T100">contratto</text:span><text:s/>(i metodi generate_structured e generate_text). Due classi lo implementano: AnthropicProvider (Claude, in cloud) e OllamaProvider (modelli locali). Quale dei due si usa lo decide la<text:s/><text:span text:style-name="T101">configurazione</text:span><text:s/>(get_llm_provider() in core/config.py, che legge il file .env).</text:p>
      <text:p text:style-name="Normale">Perché questa astrazione? Per poter<text:s/><text:span text:style-name="T102">cambiare modello senza toccare i generatori</text:span>: Claude è più potente ma richiede internet, una chiave API e ha un costo; Ollama gira in locale, gratis e offline, utile per la privacy dei dati clinici. I generatori non sanno quale dei due stanno usando: chiamano l'interfaccia, e l'implementazione concreta è iniettata. Lo vedi nel flusso reale: l'endpoint di creazione sessione (api/sessions.py) fa llm = get_llm_provider() e lo passa al generatore.</text:p>
      <text:p text:style-name="P103">Il flusso preciso di una generazione (passo passo)</text:p>
      <text:p text:style-name="Normale">Quando crei una sessione che contiene, per esempio, un test di Digit Span, ecco cosa succede dentro TestGenerator.generate() (in services/tests/base.py):</text:p>
      <text:list text:style-name="LFO6" text:continue-numbering="true">
        <text:list-item>
          <text:p text:style-name="P104"><text:span text:style-name="T105">Costruzione dei prompt.</text:span><text:s/>Il generatore costruisce un<text:s/><text:span text:style-name="T106">system prompt</text:span><text:s/>(le istruzioni: "sei un generatore di sequenze<text:s/>numeriche per un test di memoria, rispetta questi vincoli...") e un<text:s/><text:span text:style-name="T107">user prompt</text:span><text:s/>(la richiesta concreta con i parametri della configurazione).</text:p>
        </text:list-item>
        <text:list-item>
          <text:p text:style-name="P108"><text:span text:style-name="T109">Chiamata strutturata.</text:span><text:s/>Invoca self.llm_provider.generate_structured(system_prompt, user_prompt, output_schema, temperature, max_tokens). Il punto cruciale è output_schema: è lo<text:s/><text:span text:style-name="T110">schema Pydantic</text:span><text:s/>del test (es. DigitSpanBatch).</text:p>
        </text:list-item>
        <text:list-item>
          <text:p text:style-name="P111"><text:span text:style-name="T112">Output forzato nello schema (il trucco del "tool use").</text:span><text:s/>Guardando anthropic_provider.py, generate_structured non chiede al modello<text:s/>"rispondimi in JSON e incrociamo le dita". Fa una cosa più robusta: passa il tuo schema Pydantic come<text:s/><text:span text:style-name="T113">schema di input di uno "strumento"</text:span><text:s/>(input_schema) e obbliga il modello a usarlo (tool_choice = quel tool). In questo modo il modello<text:s/><text:span text:style-name="T114">deve</text:span><text:s/>restituire dati conformi alla forma che hai definito — non testo libero, ma un oggetto strutturato.</text:p>
        </text:list-item>
        <text:list-item>
          <text:p text:style-name="P115"><text:span text:style-name="T116">Validazione e retry con feedback.</text:span><text:s/>L'output viene validato con Pydantic. Se per qualche motivo non è valido, il provider<text:s/><text:span text:style-name="T117">riprova</text:span><text:s/>(for attempt in range(self.max_retries)), reinserendo nel prompt il messaggio d'errore così il modello si corregge. Questo è il motivo per cui il sistema è affidabile: l'output che arriva ai generatori è<text:s/><text:span text:style-name="T118">sempre</text:span><text:s/>uno schema valido, oppure fallisce in modo controllato.</text:p>
        </text:list-item>
        <text:list-item>
          <text:p text:style-name="P119"><text:span text:style-name="T120">Persistenza.</text:span><text:s/>Lo stimolo generato viene salvato in generated_stimuli insieme ai metadati: quale provider l'ha prodotto (llm_provider) e informazioni accessorie (llm_metadata). Così resta tracciabile<text:s/><text:span text:style-name="T121">come</text:span><text:s/>è stato generato ogni stimolo — utile per la riproducibilità in una tesi.</text:p>
        </text:list-item>
      </text:list>
      <text:p text:style-name="P122">Perché queste scelte (i punti da difendere)</text:p>
      <text:p text:style-name="Normale"><text:span text:style-name="T123">Perché output strutturato e non testo libero?</text:span><text:s/>Perché un test clinico non può tollerare stimoli malformati. Vincolando l'LLM allo schema Pydantic e validando con retry, garantisci che ogni stimolo rispetti i vincoli del test (es. cifre nell'intervallo giusto, niente sequenze banali). È la differenza tra "usare un LLM" e "usare un LLM in modo ingegneristicamente affidabile".</text:p>
      <text:p text:style-name="Normale"><text:span text:style-name="T124">Perché un provider astratto?</text:span><text:s/>Per disaccoppiare la logica dei test dal fornitore del modello: flessibilità cloud/locale, sostituibilità, e testabilità (puoi iniettare un provider finto nei test).</text:p>
      <text:p text:style-name="Normale"><text:span text:style-name="T125">Perché l'LLM solo per la generazione e non per l'analisi?</text:span><text:s/>Perché l'analisi richiede misure<text:s/><text:span text:style-name="T126">oggettive e riproducibili</text:span><text:s/>(metriche linguistiche, classificazioni affettive con modelli specializzati), non testo generato. Usare un LLM generativo per "diagnosticare" sarebbe metodologicamente debole; usarlo per<text:s/><text:span text:style-name="T127">generare materiale di stimolo controllato</text:span><text:s/>è appropriato. Questa separazione è una forza del tuo design.</text:p>
      <text:p text:style-name="P128">In una frase, per la discussione</text:p>
      <text:p text:style-name="Normale"><text:span text:style-name="T129">"L'LLM (Claude o Ollama, intercambiabili tramite un provider astratto) è usato esclusivamente per generare gli stimoli dei test di Digit Span e Stroop, con output forzato in uno schema Pydantic tramite tool use, validazione e retry; gli altri test sono procedurali, e l'intera pipeline di analisi del linguaggio non usa LLM generativi ma modelli specializzati di NLP e classificazione affettiva."</text:span></text:p>
      <text:p text:style-name="Normale">Se vuoi, posso mostrarti<text:s/><text:span text:style-name="T130">riga per riga</text:span><text:s/>il contenuto reale dei prompt che il generatore Digit Span o Stroop invia all'LLM (system + user prompt), così sai esattamente cosa "dici" al modello e puoi spiegarlo o difenderlo nel dettaglio. Te li tiro fuori dal codice?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>Prima la tua domanda sull'ASR, poi<text:s/>costruisco i due moduli. Verifico nel codice l'uso della distanza di Levenshtein e leggo gli schemi del Narrative per allinearmi ai campi reali:Risposta secca sull'ASR:<text:s/><text:span text:style-name="T131">no, la distanza di Levenshtein non è nell'ASR.</text:span><text:s/>L'ASR (Whisper, in transcription.py) si limita a trascrivere l'audio in testo e, con parse_digit_sequence, a convertire le cifre dette ("tre otto uno") in numeri. La<text:s/><text:span text:style-name="T132">Levenshtein è nello scorer del Digit Span</text:span><text:s/>(digit_span_scorer.py, funzione _levenshtein_operations): confronta la sequenza<text:s/><text:span text:style-name="T133">trascrit</text:span><text:span text:style-name="T134">ta</text:span><text:s/>con quella<text:s/><text:span text:style-name="T135">attesa</text:span><text:s/>per dare un punteggio graduato (non solo giusto/sbagliato). Quindi il flusso è: ASR trascrive → parse_digit_sequence estrae i numeri → lo<text:s/><text:span text:style-name="T136">scorer</text:span><text:s/>applica Levenshtein. La distanza di edit misura la prestazione di memoria, non corregge la trascrizione.</text:p>
      <text:p text:style-name="Normale">Leggo i campi esatti di NarrativePrompt e del generatore per allineare i due moduli nuovi:Tutto chiaro: lo NarrativeGenerator ha già pronti i metodi di prompt per un futuro uso LLM, e ho gli schemi esatti. Costruisco i due moduli.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RANCESCO SABIA</meta:initial-creator>
    <dc:creator>FRANCESCO SABIA</dc:creator>
    <meta:creation-date>2026-05-26T09:09:00Z</meta:creation-date>
    <dc:date>2026-05-26T16:32:00Z</dc:date>
    <meta:template xlink:href="Normal" xlink:type="simple"/>
    <meta:editing-cycles>5</meta:editing-cycles>
    <meta:editing-duration>PT540S</meta:editing-duration>
    <meta:document-statistic meta:page-count="1" meta:paragraph-count="30" meta:word-count="2275" meta:character-count="15219" meta:row-count="108" meta:non-whitespace-character-count="12974"/>
  </office:meta>
</office:document-meta>
</file>